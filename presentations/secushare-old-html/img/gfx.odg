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999999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solid" svg:stroke-width="0.3cm" svg:stroke-color="#000000" draw:marker-start-width="0.65cm" draw:marker-end-width="0.6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051cm" svg:stroke-color="#000000" draw:marker-start="Arrow_20_concave" draw:marker-start-width="0.381cm" draw:marker-end="Arrow_20_concave" draw:marker-end-width="0.381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="Arrow_20_concave" draw:marker-start-width="0.381cm" draw:marker-end="Arrow_20_concave" draw:marker-end-width="0.381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4.6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8cm" fo:min-width="3.5cm"/>
    </style:style>
    <style:style style:name="gr8" style:family="graphic" style:parent-style-name="standard">
      <style:graphic-properties draw:stroke="solid" svg:stroke-width="0.3cm" svg:stroke-color="#000000" draw:marker-start-width="0.65cm" draw:marker-end-width="0.65cm" draw:fill="solid" draw:fill-color="#000000" draw:opacity="100%" draw:textarea-horizontal-align="justify" draw:textarea-vertical-align="middle" draw:auto-grow-height="false" fo:padding-top="0.275cm" fo:padding-bottom="0.275cm" fo:padding-left="0.4cm" fo:padding-right="0.4cm" draw:shadow-opacity="100%"/>
    </style:style>
    <style:style style:name="gr9" style:family="graphic" style:parent-style-name="standard">
      <style:graphic-properties draw:stroke="solid" svg:stroke-width="0.3cm" svg:stroke-color="#000000" draw:marker-start-width="0.65cm" draw:marker-end-width="0.65cm" draw:fill="solid" draw:fill-color="#000000" draw:opacity="100%" draw:textarea-horizontal-align="justify" draw:textarea-vertical-align="middle" draw:auto-grow-height="false" fo:padding-top="0.275cm" fo:padding-bottom="0.275cm" fo:padding-left="0.4cm" fo:padding-right="0.4cm" draw:shadow-offset-x="0.203cm" draw:shadow-offset-y="0.203cm" draw:shadow-opacity="100%"/>
    </style:style>
    <style:style style:name="gr10" style:family="graphic" style:parent-style-name="standard">
      <style:graphic-properties draw:stroke="solid" svg:stroke-width="0.3cm" svg:stroke-color="#000000" draw:marker-start-width="0.65cm" draw:marker-end-width="0.65cm" draw:fill="solid" draw:fill-color="#000000" draw:textarea-horizontal-align="justify" draw:textarea-vertical-align="middle" draw:auto-grow-height="false" fo:padding-top="0.275cm" fo:padding-bottom="0.275cm" fo:padding-left="0.4cm" fo:padding-right="0.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Sawasdee" style:font-pitch="variable" fo:font-size="15pt" style:font-size-asian="15pt" style:font-size-complex="15pt"/>
    </style:style>
    <style:style style:name="P5" style:family="paragraph">
      <style:text-properties fo:font-family="Sawasdee" style:font-pitch="variable" fo:font-size="15pt" style:font-size-asian="15pt" style:font-size-complex="15pt"/>
    </style:style>
    <style:style style:name="T1" style:family="text">
      <style:text-properties fo:font-family="Sawasdee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1cm" svg:height="2.91cm" svg:x="12.031cm" svg:y="3.21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0.105cm" svg:height="0.105cm" svg:x="2.646cm" svg:y="8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04cm" svg:y1="3.458cm" svg:x2="5.766cm" svg:y2="2.566cm">
          <text:p/>
        </draw:line>
        <draw:line draw:style-name="gr3" draw:text-style-name="P1" draw:layer="layout" svg:x1="4.527cm" svg:y1="4.382cm" svg:x2="6.44cm" svg:y2="5.406cm">
          <text:p/>
        </draw:line>
        <draw:line draw:style-name="gr3" draw:text-style-name="P1" draw:layer="layout" svg:x1="1.714cm" svg:y1="2.566cm" svg:x2="3.063cm" svg:y2="3.458cm">
          <text:p/>
        </draw:line>
        <draw:line draw:style-name="gr4" draw:text-style-name="P1" draw:layer="layout" svg:x1="2.477cm" svg:y1="15.72cm" svg:x2="5.853cm" svg:y2="16.267cm">
          <text:p/>
        </draw:line>
        <draw:line draw:style-name="gr4" draw:text-style-name="P1" draw:layer="layout" svg:x1="1.931cm" svg:y1="16.086cm" svg:x2="1.566cm" svg:y2="19.279cm">
          <text:p/>
        </draw:line>
        <draw:line draw:style-name="gr4" draw:text-style-name="P1" draw:layer="layout" svg:x1="1.93cm" svg:y1="19.826cm" svg:x2="6.492cm" svg:y2="19.735cm">
          <text:p/>
        </draw:line>
        <draw:line draw:style-name="gr4" draw:text-style-name="P1" draw:layer="layout" svg:x1="6.492cm" svg:y1="16.724cm" svg:x2="6.857cm" svg:y2="19.188cm">
          <text:p/>
        </draw:line>
        <draw:line draw:style-name="gr4" draw:text-style-name="P1" draw:layer="layout" svg:x1="2.295cm" svg:y1="15.993cm" svg:x2="6.583cm" svg:y2="19.46cm">
          <text:p/>
        </draw:line>
        <draw:line draw:style-name="gr4" draw:text-style-name="P1" draw:layer="layout" svg:x1="1.93cm" svg:y1="19.37cm" svg:x2="6.036cm" svg:y2="16.724cm">
          <text:p/>
        </draw:line>
        <draw:frame draw:style-name="gr5" draw:text-style-name="P4" draw:layer="layout" svg:width="3cm" svg:height="4.211cm" svg:x="3.592cm" svg:y="7.79cm">
          <draw:text-box>
            <text:p text:style-name="P3"><text:span text:style-name="T1">Person</text:span></text:p>
            <text:p text:style-name="P3"><text:span text:style-name="T1"/></text:p>
            <text:p text:style-name="P3"><text:span text:style-name="T1">Data</text:span></text:p>
            <text:p text:style-name="P3"><text:span text:style-name="T1"/></text:p>
            <text:p text:style-name="P3"><text:span text:style-name="T1">Company</text:span></text:p>
          </draw:text-box>
        </draw:frame>
        <draw:line draw:style-name="gr4" draw:text-style-name="P2" draw:layer="layout" svg:x1="1.962cm" svg:y1="9.884cm" svg:x2="3.441cm" svg:y2="9.884cm">
          <text:p/>
        </draw:line>
        <draw:frame draw:style-name="gr6" draw:text-style-name="P5" draw:layer="layout" svg:width="3.952cm" svg:height="1.043cm" svg:x="1.664cm" svg:y="1.358cm">
          <draw:text-box>
            <text:p><text:span text:style-name="T1">What we have</text:span></text:p>
          </draw:text-box>
        </draw:frame>
        <draw:frame draw:style-name="gr7" draw:text-style-name="P5" draw:layer="layout" svg:width="4.775cm" svg:height="1.088cm" svg:x="3.055cm" svg:y="14.909cm">
          <draw:text-box>
            <text:p><text:span text:style-name="T1">What we want</text:span></text:p>
          </draw:text-box>
        </draw:frame>
        <draw:custom-shape draw:style-name="gr8" draw:text-style-name="P2" draw:layer="layout" svg:width="0.685cm" svg:height="0.686cm" svg:x="3.482cm" svg:y="3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985cm" svg:y1="5.285cm" svg:x2="3.12cm" svg:y2="4.474cm">
          <text:p/>
        </draw:line>
        <draw:custom-shape draw:style-name="gr9" draw:text-style-name="P2" draw:layer="layout" svg:width="0.602cm" svg:height="0.602cm" svg:x="2.415cm" svg:y="11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05cm" svg:height="0.105cm" svg:x="1.492cm" svg:y="5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05cm" svg:height="0.105cm" svg:x="1.274cm" svg:y="2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05cm" svg:height="0.105cm" svg:x="6.022cm" svg:y="2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05cm" svg:height="0.105cm" svg:x="6.854cm" svg:y="5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.891cm" svg:y="15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6.332cm" svg:y="16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6.812cm" svg:y="19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.401cm" svg:y="19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387cm" svg:y1="4.152cm" svg:x2="16.549cm" svg:y2="3.26cm">
          <text:p/>
        </draw:line>
        <draw:line draw:style-name="gr3" draw:text-style-name="P1" draw:layer="layout" svg:x1="14.186cm" svg:y1="6.464cm" svg:x2="15.68cm" svg:y2="7.232cm">
          <text:p/>
        </draw:line>
        <draw:line draw:style-name="gr3" draw:text-style-name="P1" draw:layer="layout" svg:x1="10.086cm" svg:y1="3.419cm" svg:x2="11.435cm" svg:y2="4.311cm">
          <text:p/>
        </draw:line>
        <draw:custom-shape draw:style-name="gr8" draw:text-style-name="P2" draw:layer="layout" svg:width="0.685cm" svg:height="0.686cm" svg:x="11.714cm" svg:y="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357cm" svg:y1="5.944cm" svg:x2="11.492cm" svg:y2="5.133cm">
          <text:p/>
        </draw:line>
        <draw:custom-shape draw:style-name="gr2" draw:text-style-name="P2" draw:layer="layout" svg:width="0.105cm" svg:height="0.105cm" svg:x="9.987cm" svg:y="6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05cm" svg:height="0.105cm" svg:x="9.646cm" svg:y="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05cm" svg:height="0.105cm" svg:x="16.805cm" svg:y="2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05cm" svg:height="0.105cm" svg:x="16.037cm" svg:y="7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089cm" svg:y1="22.189cm" svg:x2="18.465cm" svg:y2="22.736cm">
          <text:p/>
        </draw:line>
        <draw:line draw:style-name="gr4" draw:text-style-name="P1" draw:layer="layout" svg:x1="11.668cm" svg:y1="20.632cm" svg:x2="11.303cm" svg:y2="23.825cm">
          <text:p/>
        </draw:line>
        <draw:line draw:style-name="gr4" draw:text-style-name="P1" draw:layer="layout" svg:x1="11.667cm" svg:y1="24.372cm" svg:x2="16.229cm" svg:y2="24.281cm">
          <text:p/>
        </draw:line>
        <draw:line draw:style-name="gr4" draw:text-style-name="P1" draw:layer="layout" svg:x1="11.313cm" svg:y1="16.983cm" svg:x2="11.678cm" svg:y2="19.447cm">
          <text:p/>
        </draw:line>
        <draw:line draw:style-name="gr4" draw:text-style-name="P1" draw:layer="layout" svg:x1="14.96cm" svg:y1="21.623cm" svg:x2="16.016cm" svg:y2="20.086cm">
          <text:p/>
        </draw:line>
        <draw:line draw:style-name="gr4" draw:text-style-name="P1" draw:layer="layout" svg:x1="11.667cm" svg:y1="23.916cm" svg:x2="13.864cm" svg:y2="22.485cm">
          <text:p/>
        </draw:line>
        <draw:custom-shape draw:style-name="gr10" draw:text-style-name="P2" draw:layer="layout" svg:width="0.105cm" svg:height="0.105cm" svg:x="11.628cm" svg:y="20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1.169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6.549cm" svg:y="2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1.138cm" svg:y="24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02cm" svg:height="0.602cm" svg:x="14.114cm" svg:y="21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02cm" svg:height="0.602cm" svg:x="16.053cm" svg:y="1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407cm" svg:y1="18.872cm" svg:x2="16.545cm" svg:y2="16.506cm">
          <text:p/>
        </draw:line>
        <draw:custom-shape draw:style-name="gr10" draw:text-style-name="P2" draw:layer="layout" svg:width="0.105cm" svg:height="0.105cm" svg:x="16.57cm" svg:y="15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407cm" svg:y1="21.372cm" svg:x2="14.545cm" svg:y2="19.006cm">
          <text:p/>
        </draw:line>
        <draw:custom-shape draw:style-name="gr10" draw:text-style-name="P2" draw:layer="layout" svg:width="0.105cm" svg:height="0.105cm" svg:x="14.571cm" svg:y="1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8.85cm" svg:y="22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795cm" svg:y1="19.101cm" svg:x2="17.727cm" svg:y2="17.14cm">
          <text:p/>
        </draw:line>
        <draw:custom-shape draw:style-name="gr10" draw:text-style-name="P2" draw:layer="layout" svg:width="0.105cm" svg:height="0.105cm" svg:x="17.771cm" svg:y="16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09cm" svg:y1="19.345cm" svg:x2="18.503cm" svg:y2="18.146cm">
          <text:p/>
        </draw:line>
        <draw:custom-shape draw:style-name="gr10" draw:text-style-name="P2" draw:layer="layout" svg:width="0.105cm" svg:height="0.105cm" svg:x="18.772cm" svg:y="1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85cm" svg:height="0.686cm" svg:x="13.215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85cm" svg:height="0.686cm" svg:x="14.515cm" svg:y="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85cm" svg:height="0.686cm" svg:x="13.115cm" svg:y="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916cm" svg:y1="9.329cm" svg:x2="14.292cm" svg:y2="9.876cm">
          <text:p/>
        </draw:line>
        <draw:line draw:style-name="gr4" draw:text-style-name="P1" draw:layer="layout" svg:x1="10.37cm" svg:y1="9.695cm" svg:x2="10.005cm" svg:y2="12.888cm">
          <text:p/>
        </draw:line>
        <draw:line draw:style-name="gr4" draw:text-style-name="P1" draw:layer="layout" svg:x1="10.369cm" svg:y1="13.435cm" svg:x2="14.931cm" svg:y2="13.344cm">
          <text:p/>
        </draw:line>
        <draw:line draw:style-name="gr4" draw:text-style-name="P1" draw:layer="layout" svg:x1="14.931cm" svg:y1="10.333cm" svg:x2="15.296cm" svg:y2="12.797cm">
          <text:p/>
        </draw:line>
        <draw:line draw:style-name="gr4" draw:text-style-name="P1" draw:layer="layout" svg:x1="10.734cm" svg:y1="9.602cm" svg:x2="15.022cm" svg:y2="13.069cm">
          <text:p/>
        </draw:line>
        <draw:line draw:style-name="gr4" draw:text-style-name="P1" draw:layer="layout" svg:x1="10.369cm" svg:y1="12.979cm" svg:x2="14.475cm" svg:y2="10.333cm">
          <text:p/>
        </draw:line>
        <draw:custom-shape draw:style-name="gr10" draw:text-style-name="P2" draw:layer="layout" svg:width="0.105cm" svg:height="0.105cm" svg:x="10.33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4.771cm" svg:y="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15.251cm" svg:y="13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05cm" svg:height="0.105cm" svg:x="9.84cm" svg:y="13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none" draw:fill-color="#cfe7e5" draw:fill-gradient-name="Gradient_20_7" draw:fill-hatch-name="Hatch_20_1" draw:fill-image-name="Bitmape_20_1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2-20T17:04:19</meta:creation-date>
    <dc:date>2012-03-10T07:55:38</dc:date>
    <meta:editing-duration>PT20H01M55S</meta:editing-duration>
    <meta:editing-cycles>31</meta:editing-cycles>
    <meta:generator>OpenOffice.org/3.0$Linux OpenOffice.org_project/300m15$Build-9379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